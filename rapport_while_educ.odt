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3">
  <office:body>
    <office:text>
      <text:p text:style-name="Heading_20_1">Guide d'utilisation du projet While Educ</text:p>
      <text:p text:style-name="Standard">Résumé</text:p>
      <text:p text:style-name="Standard">Ce document présente une vue d'ensemble fonctionnelle et technique du backend Django de While Educ. Il accompagne l'utilisateur et le responsable de projet pour l'installation, la configuration, la navigation et l'exploitation du système.</text:p>
      <text:p text:style-name="Heading_20_1">1. Présentation du projet</text:p>
      <text:p text:style-name="Standard">While Educ est un backend Django conçu pour gérer un site institutionnel scolaire avec des modules de communication, de gestion du personnel, des élèves et de la finance.</text:p>
      <text:p text:style-name="Standard">Le projet utilise Django 6.0.2, Jazzmin pour l'administration, TinyMCE pour l'édition de contenu et une base SQLite en local.</text:p>
      <text:p text:style-name="Heading_20_1">2. Installation</text:p>
      <text:p text:style-name="Standard">Dépendances principales :</text:p>
      <text:p text:style-name="Standard">- Django 6.0.2</text:p>
      <text:p text:style-name="Standard">- django-jazzmin 3.0.4</text:p>
      <text:p text:style-name="Standard">- django-tinymce 5.0.0</text:p>
      <text:p text:style-name="Standard">- djangorestframework 3.16.1</text:p>
      <text:p text:style-name="Standard">- django-phonenumber-field 8.4.0</text:p>
      <text:p text:style-name="Standard">- Pillow 12.1.1</text:p>
      <text:p text:style-name="Standard">- psycopg2-binary 2.9.11 (optionnel, base PostgreSQL)</text:p>
      <text:p text:style-name="Standard">- redis, PyJWT, drf-spectacular, django-debug-toolbar et autres utilitaires listés dans requirements.txt.</text:p>
      <text:p text:style-name="Standard">Installation typique :</text:p>
      <text:p text:style-name="Standard">1. Créer et activer un environnement virtuel Python.</text:p>
      <text:p text:style-name="Standard">2. Installer les dépendances : pip install -r requirements.txt.</text:p>
      <text:p text:style-name="Standard">3. Lancer les migrations : python manage.py migrate.</text:p>
      <text:p text:style-name="Standard">4. Créer un super-utilisateur : python manage.py createsuperuser.</text:p>
      <text:p text:style-name="Standard">5. Démarrer le serveur : python manage.py runserver.</text:p>
      <text:p text:style-name="Heading_20_1">3. Configuration</text:p>
      <text:p text:style-name="Standard">Paramètres principaux disponibles dans config/settings.py :</text:p>
      <text:p text:style-name="Standard">- DEBUG = True pour développement local.</text:p>
      <text:p text:style-name="Standard">- Base de données SQLite par défaut : db.sqlite3.</text:p>
      <text:p text:style-name="Standard">- Répertoires statiques et médias : staticfiles, media.</text:p>
      <text:p text:style-name="Standard">- Jazzmin est configuré pour un thème sombre et une présentation personnalisée du panneau d'administration.</text:p>
      <text:p text:style-name="Heading_20_1">4. Structure globale</text:p>
      <text:p text:style-name="Standard">Applications Django installées : core, staff, students, accounts, education, finance, general.</text:p>
      <text:p text:style-name="Standard">Chaque application couvre :</text:p>
      <text:p text:style-name="Standard">- core : informations administratives et profil de l'établissement.</text:p>
      <text:p text:style-name="Standard">- general : site public, pages d'accueil, actualités, programmes, contact.</text:p>
      <text:p text:style-name="Standard">- accounts : authentification, profils staff et élèves, édition de profil.</text:p>
      <text:p text:style-name="Standard">- staff : management du personnel et des doyens.</text:p>
      <text:p text:style-name="Standard">- students : catalogue et recherche des élèves.</text:p>
      <text:p text:style-name="Standard">- finance : gestion des frais, paiements, reçus et tableau de bord de la caisse.</text:p>
      <text:p text:style-name="Standard">- education : structure pédagogique, sections, options, classes, cours, titulaires.</text:p>
      <text:p text:style-name="Heading_20_1">5. Routes principales</text:p>
      <text:p text:style-name="Standard">Routes publiques et fonctionnelles :</text:p>
      <text:p text:style-name="Standard">- / : page d'accueil générale.</text:p>
      <text:p text:style-name="Standard">- /about/ : page À propos.</text:p>
      <text:p text:style-name="Standard">- /event/ : liste des événements.</text:p>
      <text:p text:style-name="Standard">- /event/&lt;id&gt; : détail d'un événement.</text:p>
      <text:p text:style-name="Standard">- /program/ : listing des programmes.</text:p>
      <text:p text:style-name="Standard">- /program/&lt;id&gt; : détail d'un programme.</text:p>
      <text:p text:style-name="Standard">- /contact/ : formulaire de contact.</text:p>
      <text:p text:style-name="Standard">- /accounts/login : connexion utilisateur.</text:p>
      <text:p text:style-name="Standard">- /accounts/logout : déconnexion.</text:p>
      <text:p text:style-name="Standard">- /accounts/profile/&lt;user_id&gt; : profil staff.</text:p>
      <text:p text:style-name="Standard">- /accounts/students/&lt;user_id&gt; : profil élève.</text:p>
      <text:p text:style-name="Standard">- /accounts/profile/edit/&lt;user_id&gt; : modification de profil.</text:p>
      <text:p text:style-name="Standard">- /doyen/ : liste des doyens par option.</text:p>
      <text:p text:style-name="Standard">- /staff/ : liste paginée du personnel.</text:p>
      <text:p text:style-name="Standard">- /liste/ : liste paginée des élèves avec filtres et recherche.</text:p>
      <text:p text:style-name="Standard">- /finance/ : tableau de bord de paiement restreint au personnel caisse.</text:p>
      <text:p text:style-name="Standard">- /finance/add_payment/ : ajout d'un paiement.</text:p>
      <text:p text:style-name="Standard">- /finance/show/&lt;student_id&gt;/ : détail des paiements d'un élève.</text:p>
      <text:p text:style-name="Standard">- /finance/print_receipt/&lt;payment_id&gt;/ : impression d'un reçu.</text:p>
      <text:p text:style-name="Heading_20_1">6. Fonctionnalités clés</text:p>
      <text:p text:style-name="Standard">Site public : pages d'accueil, actualités, programmes, contact et présentation institutionnelle.</text:p>
      <text:p text:style-name="Standard">Authentification utilisateur : connexion, gestion de session, redirection vers profils staff ou élèves.</text:p>
      <text:p text:style-name="Standard">Profil utilisateur : consultation et modification de profil via un formulaire dédié.</text:p>
      <text:p text:style-name="Standard">Gestion du personnel : listing paginé des membres du staff et affichage des doyens par option.</text:p>
      <text:p text:style-name="Standard">Gestion des élèves : recherche, filtres par section/classe/option, pagination et impression de listes.</text:p>
      <text:p text:style-name="Standard">Module finance : gestion des frais scolaires, saisie de paiements, suivi des dettes et des totaux mensuels.</text:p>
      <text:p text:style-name="Standard">Administration : interface Jazzmin pour le back-office Django, avec menus, styles et champs personnalisés.</text:p>
      <text:p text:style-name="Heading_20_1">7. Détails des données</text:p>
      <text:p text:style-name="Standard">Modèles importants :</text:p>
      <text:p text:style-name="Standard">- Core : identité de l'école, numéro d'agrément, logo, date de création.</text:p>
      <text:p text:style-name="Standard">- Contact : adresse, email, téléphone, heures d'ouverture.</text:p>
      <text:p text:style-name="Standard">- Program : programme de formation, crédits, durée, niveaux, descriptions enrichies.</text:p>
      <text:p text:style-name="Standard">- Actuality : événements, catégories, lieu, intervenant, date et visuel.</text:p>
      <text:p text:style-name="Standard">- Students : dossier élève, coordonnées, tuteur, classe, section, option, matricule et statut.</text:p>
      <text:p text:style-name="Standard">- Staff : personnel, rôles, contact, administration, dates et titres.</text:p>
      <text:p text:style-name="Standard">- Fees/Box : frais scolaires et paiements associés, mois, type de paiement, restant dû.</text:p>
      <text:p text:style-name="Heading_20_1">8. Administration et exploitation</text:p>
      <text:p text:style-name="Standard">Accès administrateur : /admin/ via Django et Jazzmin.</text:p>
      <text:p text:style-name="Standard">Recommandation : utiliser le panneau administratif pour créer les programmes, actualités, frais et profils utilisateurs.</text:p>
      <text:p text:style-name="Standard">L'application finance inclut des contrôles de rôle : seuls les comptes de caisse peuvent accéder au tableau de bord financier et aux actions de paiement.</text:p>
      <text:p text:style-name="Heading_20_1">9. Génération des comptes utilisateurs et profils</text:p>
      <text:p text:style-name="Standard">Profils utilisateur : chaque enregistrement de User déclenche un signal dans accounts/signals.py.</text:p>
      <text:p text:style-name="Standard">- create_user_profile : lorsque User est créé, un objet Profiles est créé automatiquement et relié à ce User.</text:p>
      <text:p text:style-name="Standard">- save_user_profile : à chaque sauvegarde de User, si le profil existe, il est remis à jour.</text:p>
      <text:p text:style-name="Standard">Profil stocké : avatar, bio et données liées à l'utilisateur dans accounts.models.Profiles.</text:p>
      <text:p text:style-name="Standard">- La méthode save() de Profiles redimensionne automatiquement l'avatar à 300x300 si nécessaire.</text:p>
      <text:p text:style-name="Standard">Matricules élèves : les signaux in students/signals.py créent automatiquement le matricule et un compte User pour chaque élève créé.</text:p>
      <text:p text:style-name="Standard">- Si le matricule est manquant, il est généré au format : année + code option + id élève sur 3 chiffres (ex : 2024001001).</text:p>
      <text:p text:style-name="Standard">- Le nom d'utilisateur est défini sur ce matricule.</text:p>
      <text:p text:style-name="Standard">- Le mot de passe initial est généré à partir du prénom en minuscules et de l'année de naissance (ou de l'année courante si absente).</text:p>
      <text:p text:style-name="Standard">Matricules staff : les signaux in staff/signals.py génèrent un matricule et un compte User pour chaque membre du personnel créé.</text:p>
      <text:p text:style-name="Standard">- Le matricule du staff est construit comme : année en cours + id staff zéro-complété sur 4 chiffres + deux chiffres de l'année de naissance + initiale du nom.</text:p>
      <text:p text:style-name="Standard">- Le nom d'utilisateur du staff est ce matricule.</text:p>
      <text:p text:style-name="Standard">- Le mot de passe initial est composé du nom en minuscules suivi de l'année de naissance.</text:p>
      <text:p text:style-name="Standard">La connexion utilisateur se fait via le même formulaire /accounts/login, puis la vue redirecte vers le profil staff ou élève selon l'existence d'un objet Staff ou Students associé.</text:p>
      <text:p text:style-name="Heading_20_1">10. Bonnes pratiques</text:p>
      <text:p text:style-name="Standard">- Conserver DEBUG=False en production et définir ALLOWED_HOSTS.</text:p>
      <text:p text:style-name="Standard">- Protéger les médias en production et configurer un stockage dédié si nécessaire.</text:p>
      <text:p text:style-name="Standard">- Sauvegarder régulièrement la base SQLite ou migrer vers PostgreSQL pour un usage réel.</text:p>
      <text:p text:style-name="Standard">- Vérifier les versions et dépendances dans requirements.txt avant le déploiement.</text:p>
      <text:p text:style-name="Standard">- Tester les formulaires et les flux d'authentification avant la mise en ligne.</text:p>
      <text:p text:style-name="Heading_20_1">11. Répertoire de fichiers importants</text:p>
      <text:p text:style-name="Standard">- config/settings.py : configuration Django principale.</text:p>
      <text:p text:style-name="Standard">- config/urls.py : routage global.</text:p>
      <text:p text:style-name="Standard">- manage.py : commandes de gestion.</text:p>
      <text:p text:style-name="Standard">- requirements.txt : dépendances Python.</text:p>
      <text:p text:style-name="Standard">- templates/ : gabarits HTML du front-end.</text:p>
      <text:p text:style-name="Standard">- static/ : ressources CSS/JS/images de l'application.</text:p>
      <text:p text:style-name="Standard">- media/ : contenus utilisateur téléchargés.</text:p>
      <text:p text:style-name="Standard">- docs/ : documentation supplémentaire si présente.</text:p>
      <text:p text:style-name="Heading_20_1">12. Conclusion</text:p>
      <text:p text:style-name="Standard">Ce guide est conçu pour offrir une compréhension rapide et complète du backend While Educ. Il couvre l'installation, la configuration, la structure fonctionnelle et les usages clés pour les responsables et les utilisateurs du système.</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office:version="1.3">
  <office:styles>
    <style:style style:name="Standard" style:family="paragraph">
      <style:text-properties fo:font-size="11pt"/>
    </style:style>
    <style:style style:name="Heading_20_1" style:family="paragraph" style:parent-style-name="Standard">
      <style:text-properties fo:font-size="16pt" fo:font-weight="bold"/>
    </style:style>
  </office:styles>
</office:document-styles>
</file>

<file path=meta.xml><?xml version="1.0" encoding="utf-8"?>
<office:document-meta xmlns:office="urn:oasis:names:tc:opendocument:xmlns:office:1.0" xmlns:dc="http://purl.org/dc/elements/1.1/" xmlns:meta="urn:oasis:names:tc:opendocument:xmlns:meta:1.0" office:version="1.3">
  <office:meta>
    <dc:title>Guide d'utilisation - While Educ</dc:title>
    <dc:language>fr-FR</dc:language>
    <meta:creation-date>2026-05-20T12:22:44Z</meta:creation-date>
    <meta:initial-creator>GitHub Copilot</meta:initial-creator>
  </office:meta>
</office:document-meta>
</file>